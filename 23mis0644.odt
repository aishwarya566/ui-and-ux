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1d99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1d99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d996" officeooo:paragraph-rsid="0011d996" style:font-weight-asian="bold" style:font-weight-complex="bold" loext:padding="0in" loext:border="none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1d996" style:font-weight-asian="bold" style:font-weight-complex="bold" loext:padding="0in" loext:border="none"/>
    </style:style>
    <style:style style:name="P5" style:family="paragraph" style:parent-style-name="Standard">
      <style:paragraph-properties fo:text-align="start" style:justify-single-word="false"/>
      <style:text-properties fo:font-weight="bold" officeooo:rsid="0011d996" officeooo:paragraph-rsid="0011d996" style:font-weight-asian="bold" style:font-weight-complex="bold" loext:padding="0in" loext:border="none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1d996"/>
    </style:style>
    <style:style style:name="P7" style:family="paragraph" style:parent-style-name="Standard">
      <style:paragraph-properties fo:text-align="start" style:justify-single-word="false"/>
      <style:text-properties officeooo:paragraph-rsid="0011d996"/>
    </style:style>
    <style:style style:name="P8" style:family="paragraph" style:parent-style-name="Standard">
      <style:paragraph-properties fo:text-align="start" style:justify-single-word="false"/>
      <style:text-properties fo:font-weight="bold" officeooo:rsid="0011d996" officeooo:paragraph-rsid="0011d996" style:font-weight-asian="bold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weight="normal" officeooo:rsid="0011d996" officeooo:paragraph-rsid="0011d996" style:font-weight-asian="norma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font-weight="bold" officeooo:rsid="0013b0f8" officeooo:paragraph-rsid="0013b0f8" style:font-weight-asian="bold" style:font-weight-complex="bold"/>
    </style:style>
    <style:style style:name="T1" style:family="text">
      <style:text-properties loext:padding="0in" loext:border="none"/>
    </style:style>
    <style:style style:name="T2" style:family="text">
      <style:text-properties fo:font-variant="normal" fo:text-transform="none" fo:color="#212529" loext:opacity="100%" fo:font-family="'Segoe UI', Tahoma, Geneva, Verdana, sans-serif" fo:font-size="9pt" fo:letter-spacing="normal" fo:font-style="normal" fo:font-weight="normal"/>
    </style:style>
    <style:style style:name="T3" style:family="text">
      <style:text-properties officeooo:rsid="0011d996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officeooo:rsid="0011d996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1"><text:span text:style-name="T1">ISWE407P</text:span><text:span text:style-name="T2">- </text:span><text:span text:style-name="T1">User Interface and User Experience Design Lab</text:span></text:p>
      <text:p text:style-name="P3">EXPERIMENT-1</text:p>
      <text:p text:style-name="P3"/>
      <text:p text:style-name="P4"/>
      <text:p text:style-name="P5">NAME:Aishwarya.p</text:p>
      <text:p text:style-name="P5">REG NO:23MIS0644</text:p>
      <text:p text:style-name="P2"/>
      <text:p text:style-name="P2"/>
      <text:p text:style-name="P2"/>
      <text:p text:style-name="P2"/>
      <text:p text:style-name="P2">EXPERIMENT -1 Identify and observe bad designs and submit a minimum of 3 to 5 photographs of bad designs in the surrounding, home, product, or neighborhood. Create a Word or PDF report containing: </text:p>
      <text:p text:style-name="P2"/>
      <text:list text:style-name="L1">
        <text:list-header>
          <text:p text:style-name="P6"/>
        </text:list-header>
        <text:list-item>
          <text:p text:style-name="P6">Source of photographs (GPS-enabled, own photograph, taken by you)  <text:span text:style-name="T3">]</text:span></text:p>
        </text:list-item>
        <text:list-item>
          <text:p text:style-name="P6">Description of the design </text:p>
        </text:list-item>
        <text:list-item>
          <text:p text:style-name="P6">Place (LOCATION) </text:p>
        </text:list-item>
        <text:list-item>
          <text:p text:style-name="P6">Reasons why the design is bad </text:p>
        </text:list-item>
        <text:list-item>
          <text:p text:style-name="P6">Suggested Improvement</text:p>
        </text:list-item>
      </text:list>
      <text:p text:style-name="P7"/>
      <text:p text:style-name="P7"/>
      <text:p text:style-name="P7"/>
      <text:p text:style-name="P7"><text:span text:style-name="T4">Bad Design 1</text:span>: <text:span text:style-name="T5">UNNECESSARY HANDWASH PLACEMENT AT ENTRANCE</text:span></text:p>
      <text:p text:style-name="P8"/>
      <text:p text:style-name="P8">DESCRIPTION:</text:p>
      <text:p text:style-name="P9">unnecessary handwash placement at the entrance of the building</text:p>
      <text:p text:style-name="P9"/>
      <text:p text:style-name="P9"/>
      <text:p text:style-name="P9"/>
      <text:p text:style-name="P9"/>
      <text:p text:style-name="P10">Bad design 2: NO SUFFICIENT VENTILATION IN A CLASS</text:p>
      <text:p text:style-name="P10"/>
      <text:p text:style-name="P10">Description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Bad design 3:bad infrastructure of washroom</text:p>
      <text:p text:style-name="P10"/>
      <text:p text:style-name="P10">Description: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Bad design 4: limited biometric access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Bad design 5: lift and canteen placement</text:p>
      <text:p text:style-name="P10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8T10:57:12.986934590</meta:creation-date>
    <dc:date>2026-07-08T11:14:26.530083348</dc:date>
    <meta:editing-duration>PT7M1S</meta:editing-duration>
    <meta:editing-cycles>1</meta:editing-cycles>
    <meta:document-statistic meta:table-count="0" meta:image-count="0" meta:object-count="0" meta:page-count="2" meta:paragraph-count="20" meta:word-count="128" meta:character-count="795" meta:non-whitespace-character-count="692"/>
    <meta:generator>LibreOffice/25.8.6.2$Linux_X86_64 LibreOffice_project/a46b460d1686bb49c718d2ef5f88b83ff2dc4981</meta:generator>
  </office:meta>
</office:document-meta>
</file>